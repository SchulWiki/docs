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413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fo:font-size="15pt" officeooo:rsid="001eb807" officeooo:paragraph-rsid="001eb807" style:font-size-asian="15pt" style:font-size-complex="15pt"/>
    </style:style>
    <style:style style:name="P2" style:family="paragraph" style:parent-style-name="Standard">
      <style:text-properties officeooo:rsid="001eb807" officeooo:paragraph-rsid="001eb807"/>
    </style:style>
    <style:style style:name="P3" style:family="paragraph" style:parent-style-name="Standard">
      <style:text-properties officeooo:rsid="001f5bd5" officeooo:paragraph-rsid="001f5bd5"/>
    </style:style>
    <style:style style:name="P4" style:family="paragraph" style:parent-style-name="Standard">
      <style:text-properties officeooo:rsid="001eb807" officeooo:paragraph-rsid="0022f2ab"/>
    </style:style>
    <style:style style:name="P5" style:family="paragraph" style:parent-style-name="Standard">
      <style:text-properties officeooo:rsid="001eb807" officeooo:paragraph-rsid="002267e3"/>
    </style:style>
    <style:style style:name="P6" style:family="paragraph" style:parent-style-name="Standard">
      <style:text-properties officeooo:rsid="001eb807" officeooo:paragraph-rsid="001f5bd5"/>
    </style:style>
    <style:style style:name="P7" style:family="paragraph" style:parent-style-name="Standard">
      <style:text-properties officeooo:rsid="001f5bd5" officeooo:paragraph-rsid="002068ad"/>
    </style:style>
    <style:style style:name="P8" style:family="paragraph" style:parent-style-name="Standard">
      <style:text-properties officeooo:rsid="002068ad" officeooo:paragraph-rsid="002068ad"/>
    </style:style>
    <style:style style:name="P9" style:family="paragraph" style:parent-style-name="Standard">
      <style:text-properties fo:font-size="15pt" officeooo:rsid="00230ff6" officeooo:paragraph-rsid="00230ff6" style:font-size-asian="15pt" style:font-size-complex="15pt"/>
    </style:style>
    <style:style style:name="P10" style:family="paragraph" style:parent-style-name="Standard">
      <style:text-properties officeooo:rsid="00230ff6" officeooo:paragraph-rsid="00230ff6"/>
    </style:style>
    <style:style style:name="P11" style:family="paragraph" style:parent-style-name="Standard">
      <style:text-properties fo:font-size="15pt" officeooo:rsid="0024b5d5" officeooo:paragraph-rsid="0024b5d5" style:font-size-asian="15pt" style:font-size-complex="15pt"/>
    </style:style>
    <style:style style:name="P12" style:family="paragraph" style:parent-style-name="Standard">
      <style:text-properties fo:font-size="12pt" officeooo:rsid="0024b5d5" officeooo:paragraph-rsid="0024b5d5" style:font-size-asian="10.5pt" style:font-size-complex="12pt"/>
    </style:style>
    <style:style style:name="P13" style:family="paragraph" style:parent-style-name="Standard">
      <style:text-properties officeooo:rsid="0024b5d5" officeooo:paragraph-rsid="0024b5d5"/>
    </style:style>
    <style:style style:name="P14" style:family="paragraph" style:parent-style-name="Text_20_body">
      <style:text-properties style:font-name="Google Sans Text" officeooo:rsid="0024b5d5" officeooo:paragraph-rsid="0024b5d5"/>
    </style:style>
    <style:style style:name="P15" style:family="paragraph" style:parent-style-name="Horizontal_20_Line">
      <style:text-properties officeooo:rsid="0024b5d5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24b5d5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24b5d5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24b5d5"/>
    </style:style>
    <style:style style:name="P19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24b5d5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24b5d5"/>
    </style:style>
    <style:style style:name="P2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2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officeooo:rsid="0024b5d5"/>
    </style:style>
    <style:style style:name="P2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3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4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P35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24b5d5"/>
    </style:style>
    <style:style style:name="T1" style:family="text">
      <style:text-properties officeooo:rsid="0022f2ab"/>
    </style:style>
    <style:style style:name="T2" style:family="text">
      <style:text-properties officeooo:rsid="002068ad"/>
    </style:style>
    <style:style style:name="T3" style:family="text">
      <style:text-properties officeooo:rsid="001f5bd5"/>
    </style:style>
    <style:style style:name="T4" style:family="text">
      <style:text-properties officeooo:rsid="002267e3"/>
    </style:style>
    <style:style style:name="T5" style:family="text">
      <style:text-properties fo:font-weight="bold"/>
    </style:style>
    <style:style style:name="T6" style:family="text">
      <style:text-properties style:font-name="Google Sans Text" fo:font-weight="bold"/>
    </style:style>
    <style:style style:name="T7" style:family="text">
      <style:text-properties style:font-name="Google Sans Tex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en:</text:p>
      <text:p text:style-name="P2">- Admin</text:p>
      <text:p text:style-name="P2">- Editor</text:p>
      <text:p text:style-name="P2">- Guest</text:p>
      <text:p text:style-name="P2"/>
      <text:p text:style-name="P1">Features:</text:p>
      <text:p text:style-name="P3">MVP</text:p>
      <text:p text:style-name="P2">- <text:span text:style-name="T1">login (username &amp; password)</text:span></text:p>
      <text:p text:style-name="P4">- <text:span text:style-name="T1">startpage (apprenticeship, wenn eingeloggt)</text:span></text:p>
      <text:p text:style-name="P4">- add <text:span text:style-name="T2">apprenticeship</text:span> (admin)</text:p>
      <text:p text:style-name="P4">- edit <text:span text:style-name="T2">apprenticeship </text:span>(admin)</text:p>
      <text:p text:style-name="P4">- delete <text:span text:style-name="T2">apprenticeship</text:span> (admin)</text:p>
      <text:p text:style-name="P5">- add <text:span text:style-name="T1">module</text:span> (admin)</text:p>
      <text:p text:style-name="P4">- edit <text:span text:style-name="T1">module </text:span>(admin)</text:p>
      <text:p text:style-name="P4">- delete <text:span text:style-name="T1">module</text:span> (admin)</text:p>
      <text:p text:style-name="P5">- add <text:span text:style-name="T3">catagory</text:span> (admin)</text:p>
      <text:p text:style-name="P5">- edit <text:span text:style-name="T3">catagory </text:span>(admin)</text:p>
      <text:p text:style-name="P5">- delete <text:span text:style-name="T3">catagory</text:span> (admin)</text:p>
      <text:p text:style-name="P2">- add entries (admin and creator)</text:p>
      <text:p text:style-name="P2">- edit entries (admin and creator)</text:p>
      <text:p text:style-name="P2">- delete entries (admin and creator)</text:p>
      <text:p text:style-name="P2">- read entries (for all users)</text:p>
      <text:p text:style-name="P2">- <text:span text:style-name="T3">search with filter feature (for all users)</text:span></text:p>
      <text:p text:style-name="P6"/>
      <text:p text:style-name="P2"/>
      <text:p text:style-name="P3">NOT MVP</text:p>
      <text:p text:style-name="P4">- <text:span text:style-name="T1">iserv sso</text:span></text:p>
      <text:p text:style-name="P2">- changelog (not mvp)</text:p>
      <text:p text:style-name="P2">- <text:span text:style-name="T2">review/change request for entries</text:span></text:p>
      <text:p text:style-name="P4">- <text:span text:style-name="T1">ticket system (user request new module → admin approve)</text:span></text:p>
      <text:p text:style-name="P2"/>
      <text:p text:style-name="P2"/>
      <text:p text:style-name="P5"><text:tab/> <text:s text:c="5"/><text:span text:style-name="T4"><text:s text:c="10"/><text:tab/><text:tab/>admin <text:s text:c="15"/><text:tab/> <text:s text:c="3"/>user</text:span></text:p>
      <text:p text:style-name="P7"><text:span text:style-name="T2">structure: apprenticeship</text:span>→<text:span text:style-name="T2"> lernfelder →kategorien→ entries </text:span></text:p>
      <text:p text:style-name="P8">entry:</text:p>
      <text:p text:style-name="P8"/>
      <text:p text:style-name="P9">usecases:</text:p>
      <text:p text:style-name="P10">- login</text:p>
      <text:p text:style-name="P10">- manage entries</text:p>
      <text:p text:style-name="P10">- read entries</text:p>
      <text:p text:style-name="P10"/>
      <text:p text:style-name="P9">languages: </text:p>
      <text:p text:style-name="P10">backend: java</text:p>
      <text:p text:style-name="P10">frontend: javascript &amp; react</text:p>
      <text:p text:style-name="P10"/>
      <text:p text:style-name="P11">Woraus besteht ein Eintrag?</text:p>
      <text:p text:style-name="P12">- title</text:p>
      <text:p text:style-name="P12">- maincontent</text:p>
      <text:p text:style-name="P12">- author</text:p>
      <text:p text:style-name="P13">- last edited Date</text:p>
      <text:p text:style-name="P13"/>
      <text:p text:style-name="P14"><text:soft-page-break/></text:p>
      <text:section text:style-name="Sect1" text:name="model-response-message-contentr_c16fdd0eed1d42d0">
        <text:p text:style-name="P15"/>
        <text:h text:style-name="P16" text:outline-level="2">1. Projektübersicht</text:h>
        <text:p text:style-name="P17">Ziel des Projekts ist die Entwicklung eines Wissensmanagement-Systems für Ausbildungsberufe. Die Software strukturiert Informationen hierarchisch und ermöglicht es verschiedenen Benutzergruppen, Inhalte effizient zu verwalten und abzurufen.</text:p>
        <text:p text:style-name="P18">Technologiestack:</text:p>
        <text:list text:style-name="L1">
          <text:list-item>
            <text:p text:style-name="P19"><text:span text:style-name="T5">Backend:</text:span> Java (z.B. Spring Boot)</text:p>
          </text:list-item>
          <text:list-item>
            <text:p text:style-name="P19"><text:span text:style-name="T5">Frontend:</text:span> React</text:p>
          </text:list-item>
          <text:list-item>
            <text:p text:style-name="P20"><text:span text:style-name="T6">Datenstruktur:</text:span><text:span text:style-name="T7"> </text:span><text:span text:style-name="Source_20_Text"><text:span text:style-name="T7">Ausbildungsberuf (Apprenticeship)</text:span></text:span><text:span text:style-name="T7"> → </text:span><text:span text:style-name="Source_20_Text"><text:span text:style-name="T7">Lernfelder (Modules)</text:span></text:span><text:span text:style-name="T7"> → </text:span><text:span text:style-name="Source_20_Text"><text:span text:style-name="T7">Kategorien</text:span></text:span><text:span text:style-name="T7"> → </text:span><text:span text:style-name="Source_20_Text"><text:span text:style-name="T7">Einträge</text:span></text:span></text:p>
          </text:list-item>
        </text:list>
        <text:p text:style-name="P15"/>
        <text:h text:style-name="P16" text:outline-level="2">2. Rollendefinition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1"><text:span text:style-name="Strong_20_Emphasis"><text:span text:style-name="T7">Rolle</text:span></text:span></text:p>
              </table:table-cell>
              <table:table-cell table:style-name="Table1.A1" office:value-type="string">
                <text:p text:style-name="P21"><text:span text:style-name="Strong_20_Emphasis"><text:span text:style-name="T7">Beschreibung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22">Admin</text:p>
            </table:table-cell>
            <table:table-cell table:style-name="Table1.A1" office:value-type="string">
              <text:p text:style-name="P23">Vollzugriff auf alle Systemkomponenten, Stammdaten (Berufe, Module) und Inhalte.</text:p>
            </table:table-cell>
          </table:table-row>
          <table:table-row>
            <table:table-cell table:style-name="Table1.A1" office:value-type="string">
              <text:p text:style-name="P22">Editor</text:p>
            </table:table-cell>
            <table:table-cell table:style-name="Table1.A1" office:value-type="string">
              <text:p text:style-name="P23">Kann fachspezifische Einträge erstellen, bearbeiten und löschen.</text:p>
            </table:table-cell>
          </table:table-row>
          <table:table-row>
            <table:table-cell table:style-name="Table1.A1" office:value-type="string">
              <text:p text:style-name="P22">Guest</text:p>
            </table:table-cell>
            <table:table-cell table:style-name="Table1.A1" office:value-type="string">
              <text:p text:style-name="P23">Kann Inhalte über die Suche finden und lesen.</text:p>
            </table:table-cell>
          </table:table-row>
        </table:table>
        <text:p text:style-name="P15"/>
        <text:h text:style-name="P16" text:outline-level="2">3. Funktionale Anforderungen</text:h>
        <text:h text:style-name="P24" text:outline-level="3">3.1 MVP (Minimum Viable Product)</text:h>
        <text:p text:style-name="P18">Benutzerverwaltung &amp; Zugriff:</text:p>
        <text:list text:style-name="L2">
          <text:list-item>
            <text:p text:style-name="P25"><text:span text:style-name="T5">Login:</text:span> Authentifizierung via Benutzername und Passwort.</text:p>
          </text:list-item>
          <text:list-item>
            <text:p text:style-name="P25"><text:span text:style-name="T5">Startseite:</text:span> Nach dem Login erfolgt die Weiterleitung zur Übersicht der Ausbildungsberufe.</text:p>
          </text:list-item>
          <text:list-item>
            <text:p text:style-name="P25"><text:span text:style-name="T5">Rechteprüfung:</text:span> Zugriffsbeschränkung basierend auf den Rollen (Admin, Editor, Guest).</text:p>
          </text:list-item>
        </text:list>
        <text:p text:style-name="P18"/>
        <text:p text:style-name="P18"><text:soft-page-break/>Stammdatenverwaltung (Admin only):</text:p>
        <text:list text:style-name="L3">
          <text:list-item>
            <text:p text:style-name="P26">Verwaltung (<text:span text:style-name="T5">CRUD</text:span>: Create, Read, Update, Delete) von:</text:p>
            <text:list>
              <text:list-item>
                <text:p text:style-name="P26"><text:span text:style-name="T5">Apprenticeships</text:span> (Ausbildungsberufe)</text:p>
              </text:list-item>
              <text:list-item>
                <text:p text:style-name="P26"><text:span text:style-name="T5">Modules</text:span> (Lernfelder)</text:p>
              </text:list-item>
              <text:list-item>
                <text:p text:style-name="P26"><text:span text:style-name="T5">Categories</text:span> (Kategorien)</text:p>
              </text:list-item>
            </text:list>
          </text:list-item>
        </text:list>
        <text:p text:style-name="P18">Inhaltsverwaltung:</text:p>
        <text:list text:style-name="L4">
          <text:list-item>
            <text:p text:style-name="P27"><text:span text:style-name="T5">Entries (Einträge):</text:span> Erstellen, Bearbeiten und Löschen durch Admins und Editoren.</text:p>
          </text:list-item>
          <text:list-item>
            <text:p text:style-name="P28">Struktur eines Eintrags:</text:p>
            <text:list>
              <text:list-item>
                <text:p text:style-name="P27">Titel</text:p>
              </text:list-item>
              <text:list-item>
                <text:p text:style-name="P27">Hauptinhalt (Maincontent)</text:p>
              </text:list-item>
              <text:list-item>
                <text:p text:style-name="P27">Autor (automatisch/manuell)</text:p>
              </text:list-item>
              <text:list-item>
                <text:p text:style-name="P27">Letztes Änderungsdatum (Zeitstempel)</text:p>
              </text:list-item>
            </text:list>
          </text:list-item>
        </text:list>
        <text:p text:style-name="P18">Informationsabruf (Alle User):</text:p>
        <text:list text:style-name="L5">
          <text:list-item>
            <text:p text:style-name="P29"><text:span text:style-name="T5">Lesezugriff:</text:span> Ansicht aller validen Einträge.</text:p>
          </text:list-item>
          <text:list-item>
            <text:p text:style-name="P29"><text:span text:style-name="T5">Suche &amp; Filter:</text:span> Suchfunktion zum Auffinden von Einträgen inklusive Filteroptionen (z.B. nach Kategorie oder Modul).</text:p>
          </text:list-item>
        </text:list>
        <text:h text:style-name="P24" text:outline-level="3">3.2 Erweitertes Backlog (Post-MVP)</text:h>
        <text:list text:style-name="L6">
          <text:list-item>
            <text:p text:style-name="P30"><text:span text:style-name="T5">IServ SSO:</text:span> Anbindung an das IServ-Identity-Management für Single Sign-On.</text:p>
          </text:list-item>
          <text:list-item>
            <text:p text:style-name="P30"><text:span text:style-name="T5">Changelog:</text:span> Historisierung aller Änderungen an Einträgen.</text:p>
          </text:list-item>
          <text:list-item>
            <text:p text:style-name="P30"><text:span text:style-name="T5">Review-Prozess:</text:span> Workflow für Änderungsanträge (Change Requests) an bestehenden Einträgen.</text:p>
          </text:list-item>
          <text:list-item>
            <text:p text:style-name="P30"><text:span text:style-name="T5">Ticket-System:</text:span> Prozess für Nutzer, um neue Module bei Admins anzufragen.</text:p>
          </text:list-item>
        </text:list>
        <text:p text:style-name="P15"/>
        <text:h text:style-name="P16" text:outline-level="2">4. Datenmodell &amp; Hierarchie</text:h>
        <text:p text:style-name="P17">Die Software folgt einer strikten Top-Down-Hierarchie zur Organisation des Wissens:</text:p>
        <text:list text:style-name="L7">
          <text:list-item>
            <text:p text:style-name="P31"><text:span text:style-name="T5">Apprenticeship:</text:span> Die oberste Ebene (z.B. "Fachinformatiker für Anwendungsentwicklung").</text:p>
          </text:list-item>
          <text:list-item>
            <text:p text:style-name="P31"><text:span text:style-name="T5">Module (Lernfelder):</text:span> Unterteilung des Berufs in fachliche Einheiten.</text:p>
          </text:list-item>
          <text:list-item>
            <text:p text:style-name="P31"><text:soft-page-break/><text:span text:style-name="T5">Kategorien:</text:span> Thematische Gruppierung innerhalb eines Moduls.</text:p>
          </text:list-item>
          <text:list-item>
            <text:p text:style-name="P31"><text:span text:style-name="T5">Entries:</text:span> Die eigentlichen Informationseinheiten mit Fachinhalten.</text:p>
          </text:list-item>
        </text:list>
        <text:p text:style-name="P15"/>
        <text:h text:style-name="P16" text:outline-level="2">5. Use Cases (Anwendungsfälle)</text:h>
        <text:h text:style-name="P24" text:outline-level="3">UC1: Login</text:h>
        <text:list text:style-name="L8">
          <text:list-item>
            <text:p text:style-name="P32"><text:span text:style-name="T5">Akteur:</text:span> Alle Rollen</text:p>
          </text:list-item>
          <text:list-item>
            <text:p text:style-name="P32"><text:span text:style-name="T5">Beschreibung:</text:span> Der Nutzer gibt seine Credentials ein und erhält bei Erfolg Zugriff auf die für ihn freigeschalteten Bereiche.</text:p>
          </text:list-item>
        </text:list>
        <text:h text:style-name="P24" text:outline-level="3">UC2: Einträge verwalten (Manage Entries)</text:h>
        <text:list text:style-name="L9">
          <text:list-item>
            <text:p text:style-name="P33"><text:span text:style-name="T5">Akteur:</text:span> Admin, Editor</text:p>
          </text:list-item>
          <text:list-item>
            <text:p text:style-name="P33"><text:span text:style-name="T5">Beschreibung:</text:span> Erstellen neuer Wissensartikel oder Aktualisieren bestehender Inhalte innerhalb der definierten Kategorien.</text:p>
          </text:list-item>
        </text:list>
        <text:h text:style-name="P24" text:outline-level="3">UC3: Einträge lesen (Read Entries)</text:h>
        <text:list text:style-name="L10">
          <text:list-item>
            <text:p text:style-name="P34"><text:span text:style-name="T5">Akteur:</text:span> Admin, Editor, Guest</text:p>
          </text:list-item>
          <text:list-item>
            <text:p text:style-name="P34"><text:span text:style-name="T5">Beschreibung:</text:span> Suchen nach spezifischen Informationen und Navigation durch die Baumstruktur (Beruf -&gt; Modul -&gt; Kategorie), um den Zielinhalt zu lesen.</text:p>
          </text:list-item>
        </text:list>
        <text:p text:style-name="P15"/>
        <text:h text:style-name="P16" text:outline-level="2">6. Nicht-funktionale Anforderungen</text:h>
        <text:list text:style-name="L11">
          <text:list-item>
            <text:p text:style-name="P35"><text:span text:style-name="T5">Benutzerfreundlichkeit:</text:span> Intuitive Navigation durch die vier Hierarchieebenen.</text:p>
          </text:list-item>
          <text:list-item>
            <text:p text:style-name="P35"><text:span text:style-name="T5">Sicherheit:</text:span> Passwortgeschützter Bereich; Schutz der Admin-Funktionen vor unbefugtem Zugriff.</text:p>
          </text:list-item>
          <text:list-item>
            <text:p text:style-name="P35"><text:span text:style-name="T5">Skalierbarkeit:</text:span> Das Backend (Java) muss in der Lage sein, eine wachsende Anzahl an Einträgen und Modulen performant zu filtern.</text:p>
          </text:list-item>
        </text:list>
      </text:section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11:51:11.428041715</meta:creation-date>
    <dc:date>2026-05-07T13:58:37.334357099</dc:date>
    <meta:editing-duration>PT52M31S</meta:editing-duration>
    <meta:editing-cycles>3</meta:editing-cycles>
    <meta:generator>LibreOffice/26.2.3.2$Linux_X86_64 LibreOffice_project/a31940f583db492bb69b3a601caf6d1b0ecf61f1</meta:generator>
    <meta:document-statistic meta:table-count="1" meta:image-count="0" meta:object-count="0" meta:page-count="4" meta:paragraph-count="103" meta:word-count="553" meta:character-count="4131" meta:non-whitespace-character-count="3675"/>
  </office:meta>
</office:document-meta>
</file>